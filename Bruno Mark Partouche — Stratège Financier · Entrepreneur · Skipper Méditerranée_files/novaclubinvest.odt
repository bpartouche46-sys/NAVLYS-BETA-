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DD0ADA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inzel" svg:font-family="Cinzel, serif"/>
    <style:font-face style:name="Playfair Display" svg:font-family="'Playfair Display', Georgia, serif"/>
    <style:font-face style:name="Rajdhani" svg:font-family="Rajdhani, system-ui, sans-serif"/>
    <style:font-face style:name="Arial2" svg:font-family="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line-height="200%" fo:orphans="2" fo:widows="2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in" fo:line-height="170%" fo:orphans="2" fo:widows="2" fo:text-indent="0in" style:auto-text-indent="false" fo:padding="0in" fo:border="none"/>
    </style:style>
    <style:style style:name="P3" style:family="paragraph" style:parent-style-name="WW-Standard">
      <style:text-properties fo:language="none" fo:country="none" style:language-asian="none" style:country-asian="none"/>
    </style:style>
    <style:style style:name="P4" style:family="paragraph" style:parent-style-name="WW-Standard">
      <style:text-properties fo:color="#000000" fo:language="none" fo:country="none" fo:background-color="#ffff00" style:language-asian="none" style:country-asian="none"/>
    </style:style>
    <style:style style:name="P5" style:family="paragraph" style:parent-style-name="WW-Standard" style:master-page-name="Standard">
      <style:paragraph-properties style:page-number="auto"/>
      <style:text-properties fo:language="none" fo:country="none" style:language-asian="none" style:country-asian="none"/>
    </style:style>
    <style:style style:name="P6" style:family="paragraph" style:parent-style-name="Heading_20_2">
      <style:text-properties fo:font-variant="normal" fo:text-transform="none" fo:color="#000000" style:font-name="Playfair Display" fo:letter-spacing="normal" fo:language="none" fo:country="none" fo:font-style="normal" fo:font-weight="bold" fo:background-color="#ffff00" style:language-asian="none" style:country-asian="none"/>
    </style:style>
    <style:style style:name="T1" style:family="text">
      <style:text-properties fo:color="#a78bfa"/>
    </style:style>
    <style:style style:name="T2" style:family="text">
      <style:text-properties fo:font-variant="normal" fo:text-transform="none" style:font-name="Rajdhani" fo:letter-spacing="normal" fo:font-style="normal" fo:font-weight="normal"/>
    </style:style>
    <style:style style:name="T3" style:family="text">
      <style:text-properties fo:font-variant="normal" fo:text-transform="none" style:font-name="Rajdhani" fo:letter-spacing="normal" fo:font-style="normal" fo:font-weight="normal" fo:background-color="#ffff00"/>
    </style:style>
    <style:style style:name="T4" style:family="text">
      <style:text-properties fo:font-variant="normal" fo:text-transform="none" style:font-name="Rajdhani" fo:font-size="14pt" fo:letter-spacing="normal" fo:font-style="normal" fo:font-weight="bold" fo:background-color="#ffff00"/>
    </style:style>
    <style:style style:name="T5" style:family="text">
      <style:text-properties fo:font-variant="normal" fo:text-transform="none" style:font-name="Rajdhani" fo:font-size="14pt" fo:letter-spacing="normal" fo:font-style="normal" fo:font-weight="normal" fo:background-color="#ffff00"/>
    </style:style>
    <style:style style:name="T6" style:family="text">
      <style:text-properties fo:font-variant="normal" fo:text-transform="none" fo:color="#a78bfa" style:font-name="Rajdhani" fo:letter-spacing="normal" fo:font-style="normal" fo:font-weight="normal"/>
    </style:style>
    <style:style style:name="T7" style:family="text">
      <style:text-properties fo:font-variant="normal" fo:text-transform="none" fo:color="#a78bfa" style:font-name="Rajdhani" fo:letter-spacing="normal" fo:font-style="normal" fo:font-weight="normal" fo:background-color="#ffff00"/>
    </style:style>
    <style:style style:name="T8" style:family="text">
      <style:text-properties fo:font-variant="normal" fo:text-transform="none" fo:color="#c4b5fd" style:font-name="Cinzel" fo:font-size="14pt" fo:letter-spacing="normal" fo:font-style="normal" fo:font-weight="bold"/>
    </style:style>
    <style:style style:name="T9" style:family="text">
      <style:text-properties fo:font-variant="normal" fo:text-transform="none" fo:color="#c4b5fd" style:font-name="Cinzel" fo:font-size="14pt" fo:letter-spacing="normal" fo:font-style="normal" fo:font-weight="bold" fo:background-color="#ffff00"/>
    </style:style>
    <style:style style:name="T10" style:family="text">
      <style:text-properties fo:font-variant="normal" fo:text-transform="none" fo:color="#f8f4ff" style:font-name="Rajdhani" fo:font-size="14pt" fo:letter-spacing="normal" fo:font-style="normal" fo:font-weight="bold"/>
    </style:style>
    <style:style style:name="T11" style:family="text">
      <style:text-properties fo:font-variant="normal" fo:text-transform="none" fo:color="#f8f4ff" style:font-name="Rajdhani" fo:font-size="14pt" fo:letter-spacing="normal" fo:font-style="normal" fo:font-weight="bold" fo:background-color="#ffff00"/>
    </style:style>
    <style:style style:name="T12" style:family="text">
      <style:text-properties fo:font-variant="normal" fo:text-transform="none" fo:color="#f8f4ff" style:font-name="Rajdhani" fo:font-size="14pt" fo:letter-spacing="normal" fo:font-style="normal" fo:font-weight="normal"/>
    </style:style>
    <style:style style:name="T13" style:family="text">
      <style:text-properties fo:font-variant="normal" fo:text-transform="none" fo:color="#f8f4ff" style:font-name="Rajdhani" fo:font-size="14pt" fo:letter-spacing="normal" fo:font-style="normal" fo:font-weight="normal" fo:background-color="#ffff00"/>
    </style:style>
    <style:style style:name="T14" style:family="text">
      <style:text-properties fo:font-variant="normal" fo:text-transform="none" fo:color="#000000" style:font-name="Cinzel" fo:font-size="14pt" fo:letter-spacing="normal" fo:font-style="normal" fo:font-weight="bold" fo:background-color="#ffff00"/>
    </style:style>
    <style:style style:name="T15" style:family="text">
      <style:text-properties fo:font-variant="normal" fo:text-transform="none" fo:color="#000000" style:font-name="Rajdhani" fo:font-size="14pt" fo:letter-spacing="normal" fo:font-style="normal" fo:font-weight="bold" fo:background-color="#ffff00"/>
    </style:style>
    <style:style style:name="T16" style:family="text">
      <style:text-properties fo:font-variant="normal" fo:text-transform="none" fo:color="#000000" style:font-name="Rajdhani" fo:font-size="14pt" fo:letter-spacing="normal" fo:font-style="normal" fo:font-weight="normal" fo:background-color="#ffff00"/>
    </style:style>
    <style:style style:name="T17" style:family="text">
      <style:text-properties fo:font-variant="normal" fo:text-transform="none" fo:color="#000000" style:font-name="Rajdhani" fo:letter-spacing="normal" fo:font-style="normal" fo:font-weight="normal" fo:background-color="#ffff00"/>
    </style:style>
    <style:style style:name="T18" style:family="text">
      <style:text-properties fo:font-variant="normal" fo:text-transform="none" style:font-name="Cinzel" fo:font-size="14pt" fo:letter-spacing="normal" fo:font-style="normal" fo:font-weight="bold" fo:background-color="#ffff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a xlink:type="simple" xlink:href="https://manus.im/app/agents?previewEventId=wJXVHOQlNfMPuGszbokqH1&amp;previewSandboxPath=%2Fhome%2Fubuntu%2FpH7Gy4dmhCEpJDqwlLJWUz%2Fbruno_daily_update.html" text:style-name="Internet_20_link" text:visited-style-name="Visited_20_Internet_20_Link">https://manus.im/app/agents?previewEventId=wJXVHOQlNfMPuGszbokqH1&amp;previewSandboxPath=%2Fhome%2Fubuntu%2FpH7Gy4dmhCEpJDqwlLJWUz%2Fbruno_daily_update.html</text:a></text:p>
      <text:p text:style-name="P3"/>
      <text:p text:style-name="P3"><text:a xlink:type="simple" xlink:href="https://brunopartou-m28kblou.manus.space/" text:style-name="Internet_20_link" text:visited-style-name="Visited_20_Internet_20_Link">https://brunopartou-m28kblou.manus.space/</text:a></text:p>
      <text:p text:style-name="P3"/>
      <text:p text:style-name="P3"><text:a xlink:type="simple" xlink:href="../../bruno-partouche.html#about" text:style-name="Internet_20_link" text:visited-style-name="Visited_20_Internet_20_Link">file:///C:/Users/BP/OneDrive/Documents/Documents/Downloads/bruno-partouche.html#about</text:a></text:p>
      <text:p text:style-name="P3"/>
      <text:p text:style-name="P3"><text:a xlink:type="simple" xlink:href="../../brunopartouche.html#about" text:style-name="Internet_20_link" text:visited-style-name="Visited_20_Internet_20_Link">file:///C:/Users/BP/OneDrive/Documents/Documents/Downloads/brunopartouche.html#about</text:a></text:p>
      <text:p text:style-name="P3"/>
      <text:p text:style-name="P3"><text:a xlink:type="simple" xlink:href="../../GUIDE-MISE-EN-LIGNE.html" text:style-name="Internet_20_link" text:visited-style-name="Visited_20_Internet_20_Link">file:///C:/Users/BP/OneDrive/Documents/Documents/Downloads/GUIDE-MISE-EN-LIGNE.html</text:a></text:p>
      <text:p text:style-name="P3"/>
      <text:p text:style-name="P3"/>
      <text:p text:style-name="P3"/>
      <text:p text:style-name="P3">netifly</text:p>
      <text:p text:style-name="P3"><text:a xlink:type="simple" xlink:href="https://app.netlify.com/teams/bpartouche46/projects" text:style-name="Internet_20_link" text:visited-style-name="Visited_20_Internet_20_Link">https://app.netlify.com/teams/bpartouche46/projects</text:a></text:p>
      <text:p text:style-name="P3"/>
      <text:p text:style-name="P3">namecheap</text:p>
      <text:p text:style-name="P3"><text:a xlink:type="simple" xlink:href="https://www.namecheap.com/myaccount/login/?ReturnUrl=%2Fdomains%2Fdomaincontrolpanel%2Fbrunopartouche.com%2Fdomain" text:style-name="Internet_20_link" text:visited-style-name="Visited_20_Internet_20_Link">https://www.namecheap.com/myaccount/login/?ReturnUrl=%2fdomains%2fdomaincontrolpanel%2fbrunopartouche.com%2fdomain</text:a></text:p>
      <text:p text:style-name="P3"/>
      <text:p text:style-name="P3">modele source a developper et finaliser en brunopartouche.com</text:p>
      <text:p text:style-name="P3"><text:a xlink:type="simple" xlink:href="../../brunopartouche_1.html" text:style-name="Internet_20_link" text:visited-style-name="Visited_20_Internet_20_Link">file:///C:/Users/BP/OneDrive/Documents/Documents/Downloads/brunopartouche_1.html</text:a></text:p>
      <text:p text:style-name="P3"/>
      <text:p text:style-name="P3">slogan</text:p>
      <text:p text:style-name="P4"/>
      <text:h text:style-name="P6" text:outline-level="2">Le hasard n'existe pas pour celui qui se prépare</text:h>
      <text:p text:style-name="P1"><text:span text:style-name="T17">Issu d'une famille dont le nom est inscrit dans l'histoire des jeux de hasard en France — le </text:span><text:span text:style-name="Strong_20_Emphasis"><text:span text:style-name="T17">Groupe Partouche</text:span></text:span><text:span text:style-name="T17">, 44 casinos, leader européen — Bruno Partouche a développé depuis l'enfance une compréhension intime de la </text:span><text:span text:style-name="Strong_20_Emphasis"><text:span text:style-name="T17">mécanique du risque calculé</text:span></text:span><text:span text:style-name="T17">.</text:span></text:p>
      <text:p text:style-name="P1"><text:span text:style-name="T17">Cette proximité avec le monde des jeux n'a pas conduit à la dépendance — au contraire. Elle a forgé une discipline rare : </text:span><text:span text:style-name="Strong_20_Emphasis"><text:span text:style-name="T17">la capacité à analyser froidement la probabilité</text:span></text:span><text:span text:style-name="T17"> tout en restant à l'écoute des signaux que l'intuition capte avant les modèles.</text:span></text:p>
      <text:p text:style-name="P1"><text:span text:style-name="T17">Sur les marchés financiers comme au casino, la même vérité s'impose : </text:span><text:span text:style-name="Strong_20_Emphasis"><text:span text:style-name="T17">le joueur qui gagne durablement n'est pas chanceux — il est méthodique</text:span></text:span><text:span text:style-name="T17">. Il a une règle, il la suit. Il a une limite, il l'honore. Il connaît son avantage et l'exploite systématiquement.</text:span></text:p>
      <text:p text:style-name="P2"><text:span text:style-name="T14">01</text:span><text:span text:style-name="Strong_20_Emphasis"><text:span text:style-name="T15">Définir son avantage statistique</text:span></text:span><text:span text:style-name="T16"> avant d'engager le moindre capital. Sans edge prouvé, pas de jeu.</text:span></text:p>
      <text:p text:style-name="P2"><text:span text:style-name="T14">02</text:span><text:span text:style-name="Strong_20_Emphasis"><text:span text:style-name="T15">Taille de position fixe</text:span></text:span><text:span text:style-name="T16"> : jamais plus de 10% du capital exposé sur une seule position. Toujours.</text:span></text:p>
      <text:p text:style-name="P2"><text:span text:style-name="T14">03</text:span><text:span text:style-name="Strong_20_Emphasis"><text:span text:style-name="T15">L'émotion est une information, pas une décision</text:span></text:span><text:span text:style-name="T16">. L'intuition signale — la méthode confirme.</text:span></text:p>
      <text:p text:style-name="P2"><text:soft-page-break/><text:span text:style-name="T14">04</text:span><text:span text:style-name="Strong_20_Emphasis"><text:span text:style-name="T15">La patience est une stratégie</text:span></text:span><text:span text:style-name="T16">. Les meilleures opportunités attendent ceux qui</text:span><text:span text:style-name="T12"> n'ont pas brûlé leurs cartouches.</text:span></text:p>
      <text:p text:style-name="P3"/>
      <text:p text:style-name="P3">SAUVEGARDE MANUS </text:p>
      <text:p text:style-name="P3"/>
      <text:p text:style-name="P3">C:\Users\BP\OneDrive\Documents\Document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inzel" svg:font-family="Cinzel, serif"/>
    <style:font-face style:name="Playfair Display" svg:font-family="'Playfair Display', Georgia, serif"/>
    <style:font-face style:name="Rajdhani" svg:font-family="Rajdhani, system-ui, sans-serif"/>
    <style:font-face style:name="Arial2" svg:font-family="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_20__28_user_29_" style:class="list">
      <style:text-properties style:font-name-complex="Ari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WW-Standard" style:class="index">
      <style:paragraph-properties text:number-lines="false" text:line-number="0"/>
      <style:text-properties style:font-name-complex="Arial"/>
    </style:style>
    <style:style style:name="WW-Standard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_20__28_user_29_" style:display-name="Heading (user)" style:family="paragraph" style:parent-style-name="WW-Standard" style:next-style-name="Text_20_body_20__28_user_29_">
      <style:paragraph-properties fo:margin-top="0.1665in" fo:margin-bottom="0.0835in" fo:keep-with-next="always"/>
      <style:text-properties style:font-name="Arial" fo:font-size="14pt" style:font-name-asian="Microsoft YaHei1" style:font-size-asian="14pt" style:font-name-complex="Arial" style:font-size-complex="14pt"/>
    </style:style>
    <style:style style:name="Text_20_body_20__28_user_29_" style:display-name="Text body (user)" style:family="paragraph" style:parent-style-name="WW-Standard">
      <style:paragraph-properties fo:margin-top="0in" fo:margin-bottom="0.0835in"/>
    </style:style>
    <style:style style:name="Caption_20__28_user_29_" style:display-name="Caption (user)" style:family="paragraph" style:parent-style-name="WW-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5in" fo:margin-bottom="0.35in" fo:margin-left="0.4902in" fo:margin-right="0.4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4T14:51:00</meta:creation-date>
    <dc:date>2026-04-23T10:30:58.23</dc:date>
    <meta:editing-cycles>3</meta:editing-cycles>
    <meta:editing-duration>PT3H46M32S</meta:editing-duration>
    <meta:generator>OpenOffice/4.1.6$Win32 OpenOffice.org_project/416m1$Build-9790</meta:generator>
    <meta:document-statistic meta:table-count="0" meta:image-count="0" meta:object-count="0" meta:page-count="2" meta:paragraph-count="22" meta:word-count="219" meta:character-count="2032"/>
  </office:meta>
</office:document-meta>
</file>